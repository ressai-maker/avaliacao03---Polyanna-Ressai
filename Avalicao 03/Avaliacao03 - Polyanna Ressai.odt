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1000002BA3E734674.png" manifest:media-type="image/png"/>
  <manifest:file-entry manifest:full-path="Pictures/10000001000004F6000003F99CFF1BEC.png" manifest:media-type="image/png"/>
  <manifest:file-entry manifest:full-path="Pictures/1000000100000780000003D6F31202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b785" officeooo:paragraph-rsid="0009b785"/>
    </style:style>
    <style:style style:name="P2" style:family="paragraph" style:parent-style-name="Standard">
      <style:paragraph-properties fo:text-align="justify" style:justify-single-word="false"/>
      <style:text-properties officeooo:rsid="0009b785" officeooo:paragraph-rsid="0009b78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b785" officeooo:paragraph-rsid="0009b78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9b785" officeooo:paragraph-rsid="0009b78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d3744" officeooo:paragraph-rsid="000d374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1d358" officeooo:paragraph-rsid="0011d35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d3744" officeooo:paragraph-rsid="000d3744"/>
    </style:style>
    <style:style style:name="P8" style:family="paragraph" style:parent-style-name="Standard">
      <style:paragraph-properties fo:text-align="justify" style:justify-single-word="false"/>
      <style:text-properties officeooo:rsid="0011d358" officeooo:paragraph-rsid="0011d358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9d87" officeooo:paragraph-rsid="00129d87"/>
    </style:style>
    <style:style style:name="P10" style:family="paragraph" style:parent-style-name="Standard">
      <style:paragraph-properties fo:text-align="center" style:justify-single-word="false"/>
      <style:text-properties officeooo:rsid="00194351" officeooo:paragraph-rsid="00194351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d3744" officeooo:paragraph-rsid="000d374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1d358" officeooo:paragraph-rsid="0009b785"/>
    </style:style>
    <style:style style:name="T1" style:family="text">
      <style:text-properties style:text-position="super 58%"/>
    </style:style>
    <style:style style:name="T2" style:family="text">
      <style:text-properties officeooo:rsid="000f0d8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66533"/>
    </style:style>
    <style:style style:name="T6" style:family="text">
      <style:text-properties officeooo:rsid="0019435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5.2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TECNOLÓGICA FEDERAL DO PARANÁ</text:p>
      <text:p text:style-name="P1"/>
      <text:p text:style-name="P1"/>
      <text:p text:style-name="P1"/>
      <text:p text:style-name="P1"/>
      <text:p text:style-name="P10">POLYANNA RESSA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<text:span text:style-name="T6">VALIAÇÃO</text:span> 0<text:span text:style-name="T6">3</text:span><text:span text:style-name="T5"> </text:span>– FUNDAMENTOS DE SISTEMAS COMPUTACIONA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UARAPUAVA</text:p>
      <text:p text:style-name="P1">202<text:span text:style-name="T6">6</text:span></text:p>
      <text:p text:style-name="P1"/>
      <text:p text:style-name="P5"/>
      <text:p text:style-name="P5"><text:soft-page-break/>A<text:span text:style-name="T6">VALIAÇÃO 03</text:span></text:p>
      <text:p text:style-name="P5">FUNDAMENTOS DE SISTEMAS COMPUTACIONAIS</text:p>
      <text:p text:style-name="P5">1<text:span text:style-name="T1">o</text:span>. semestre de 202<text:span text:style-name="T6">6</text:span></text:p>
      <text:p text:style-name="P4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1" text:anchor-type="char" svg:x="-0.254cm" svg:y="0.169cm" svg:width="16.508cm" svg:height="12.257cm" draw:z-index="0"><draw:image xlink:href="Pictures/1000000100000780000003D6F312026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char" svg:x="0cm" svg:y="0.143cm" svg:width="16cm" svg:height="12.811cm" draw:z-index="1"><draw:image xlink:href="Pictures/10000001000004F6000003F99CFF1BEC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3" text:anchor-type="char" svg:y="0.355cm" svg:width="11.786cm" svg:height="10.926cm" draw:z-index="2"><draw:image xlink:href="Pictures/10000001000002F1000002BA3E734674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Ênfase" style:family="paragraph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mente_20_Título_7e_LT_7e_Gliederung_20_1" style:display-name="Somente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Gliederung_20_2" style:display-name="Somente Título~LT~Gliederung 2" style:family="paragraph" style:parent-style-name="Somente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omente_20_Título_7e_LT_7e_Gliederung_20_3" style:display-name="Somente Título~LT~Gliederung 3" style:family="paragraph" style:parent-style-name="Somente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omente_20_Título_7e_LT_7e_Gliederung_20_4" style:display-name="Somente Título~LT~Gliederung 4" style:family="paragraph" style:parent-style-name="Somente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omente_20_Título_7e_LT_7e_Gliederung_20_5" style:display-name="Somente Título~LT~Gliederung 5" style:family="paragraph" style:parent-style-name="Somente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6" style:display-name="Somente Título~LT~Gliederung 6" style:family="paragraph" style:parent-style-name="Somente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7" style:display-name="Somente Título~LT~Gliederung 7" style:family="paragraph" style:parent-style-name="Somente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8" style:display-name="Somente Título~LT~Gliederung 8" style:family="paragraph" style:parent-style-name="Somente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9" style:display-name="Somente Título~LT~Gliederung 9" style:family="paragraph" style:parent-style-name="Somente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Titel" style:display-name="Soment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Untertitel" style:display-name="Soment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Notizen" style:display-name="Soment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Hintergrundobjekte" style:display-name="Soment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mente_20_Título_7e_LT_7e_Hintergrund" style:display-name="Soment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uas_20_Partes_20_de_20_Conteúdo_7e_LT_7e_Gliederung_20_1" style:display-name="Duas Partes de Conteúd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Untertitel" style:display-name="Duas Partes d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Notizen" style:display-name="Duas Partes d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Hintergrundobjekte" style:display-name="Duas Partes d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uas_20_Partes_20_de_20_Conteúdo_7e_LT_7e_Hintergrund" style:display-name="Duas Partes d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paração_7e_LT_7e_Gliederung_20_1" style:display-name="Comparaçã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Gliederung_20_2" style:display-name="Comparação~LT~Gliederung 2" style:family="paragraph" style:parent-style-name="Comparaçã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ação_7e_LT_7e_Gliederung_20_3" style:display-name="Comparação~LT~Gliederung 3" style:family="paragraph" style:parent-style-name="Comparaçã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ação_7e_LT_7e_Gliederung_20_4" style:display-name="Comparação~LT~Gliederung 4" style:family="paragraph" style:parent-style-name="Comparaçã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ação_7e_LT_7e_Gliederung_20_5" style:display-name="Comparação~LT~Gliederung 5" style:family="paragraph" style:parent-style-name="Comparaçã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6" style:display-name="Comparação~LT~Gliederung 6" style:family="paragraph" style:parent-style-name="Comparaçã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7" style:display-name="Comparação~LT~Gliederung 7" style:family="paragraph" style:parent-style-name="Comparaçã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8" style:display-name="Comparação~LT~Gliederung 8" style:family="paragraph" style:parent-style-name="Comparaçã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9" style:display-name="Comparação~LT~Gliederung 9" style:family="paragraph" style:parent-style-name="Comparaçã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Titel" style:display-name="Comparaçã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Untertitel" style:display-name="Comparaç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Notizen" style:display-name="Comparaç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Hintergrundobjekte" style:display-name="Comparaç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paração_7e_LT_7e_Hintergrund" style:display-name="Comparaçã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7e_LT_7e_Gliederung_20_1" style:display-name="Cabeçalho da Seçã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Gliederung_20_2" style:display-name="Cabeçalho da Seção~LT~Gliederung 2" style:family="paragraph" style:parent-style-name="Cabeçalho_20_da_20_Seçã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7e_LT_7e_Gliederung_20_3" style:display-name="Cabeçalho da Seção~LT~Gliederung 3" style:family="paragraph" style:parent-style-name="Cabeçalho_20_da_20_Seçã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7e_LT_7e_Gliederung_20_4" style:display-name="Cabeçalho da Seção~LT~Gliederung 4" style:family="paragraph" style:parent-style-name="Cabeçalho_20_da_20_Seçã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7e_LT_7e_Gliederung_20_5" style:display-name="Cabeçalho da Seção~LT~Gliederung 5" style:family="paragraph" style:parent-style-name="Cabeçalho_20_da_20_Seçã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6" style:display-name="Cabeçalho da Seção~LT~Gliederung 6" style:family="paragraph" style:parent-style-name="Cabeçalho_20_da_20_Seçã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7" style:display-name="Cabeçalho da Seção~LT~Gliederung 7" style:family="paragraph" style:parent-style-name="Cabeçalho_20_da_20_Seçã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8" style:display-name="Cabeçalho da Seção~LT~Gliederung 8" style:family="paragraph" style:parent-style-name="Cabeçalho_20_da_20_Seçã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9" style:display-name="Cabeçalho da Seção~LT~Gliederung 9" style:family="paragraph" style:parent-style-name="Cabeçalho_20_da_20_Seçã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Titel" style:display-name="Cabeçalho da Seçã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Untertitel" style:display-name="Cabeçalho da Seç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Notizen" style:display-name="Cabeçalho da Seç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Hintergrundobjekte" style:display-name="Cabeçalho da Seç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7e_LT_7e_Hintergrund" style:display-name="Cabeçalho da Seçã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5f__7e_LT_7e_Gliederung_20_1" style:display-name="Cabeçalho da Seção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Gliederung_20_2" style:display-name="Cabeçalho da Seção_~LT~Gliederung 2" style:family="paragraph" style:parent-style-name="Cabeçalho_20_da_20_Seção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5f__7e_LT_7e_Gliederung_20_3" style:display-name="Cabeçalho da Seção_~LT~Gliederung 3" style:family="paragraph" style:parent-style-name="Cabeçalho_20_da_20_Seção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5f__7e_LT_7e_Gliederung_20_4" style:display-name="Cabeçalho da Seção_~LT~Gliederung 4" style:family="paragraph" style:parent-style-name="Cabeçalho_20_da_20_Seção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5f__7e_LT_7e_Gliederung_20_5" style:display-name="Cabeçalho da Seção_~LT~Gliederung 5" style:family="paragraph" style:parent-style-name="Cabeçalho_20_da_20_Seção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6" style:display-name="Cabeçalho da Seção_~LT~Gliederung 6" style:family="paragraph" style:parent-style-name="Cabeçalho_20_da_20_Seção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7" style:display-name="Cabeçalho da Seção_~LT~Gliederung 7" style:family="paragraph" style:parent-style-name="Cabeçalho_20_da_20_Seção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8" style:display-name="Cabeçalho da Seção_~LT~Gliederung 8" style:family="paragraph" style:parent-style-name="Cabeçalho_20_da_20_Seção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9" style:display-name="Cabeçalho da Seção_~LT~Gliederung 9" style:family="paragraph" style:parent-style-name="Cabeçalho_20_da_20_Seção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Titel" style:display-name="Cabeçalho da Seção_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Untertitel" style:display-name="Cabeçalho da Seção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Notizen" style:display-name="Cabeçalho da Seção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Hintergrundobjekte" style:display-name="Cabeçalho da Seção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5f__7e_LT_7e_Hintergrund" style:display-name="Cabeçalho da Seção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e-Conteúdo_7e_LT_7e_Gliederung_20_1" style:display-name="Master1-Layout2-obj-Título-e-Conteúd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Gliederung_20_2" style:display-name="Master1-Layout2-obj-Título-e-Conteúdo~LT~Gliederung 2" style:family="paragraph" style:parent-style-name="Master1-Layout2-obj-Título-e-Conteúd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ítulo-e-Conteúdo_7e_LT_7e_Gliederung_20_3" style:display-name="Master1-Layout2-obj-Título-e-Conteúdo~LT~Gliederung 3" style:family="paragraph" style:parent-style-name="Master1-Layout2-obj-Título-e-Conteúd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ítulo-e-Conteúdo_7e_LT_7e_Gliederung_20_4" style:display-name="Master1-Layout2-obj-Título-e-Conteúdo~LT~Gliederung 4" style:family="paragraph" style:parent-style-name="Master1-Layout2-obj-Título-e-Conteúd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5" style:display-name="Master1-Layout2-obj-Título-e-Conteúdo~LT~Gliederung 5" style:family="paragraph" style:parent-style-name="Master1-Layout2-obj-Título-e-Conteúd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6" style:display-name="Master1-Layout2-obj-Título-e-Conteúdo~LT~Gliederung 6" style:family="paragraph" style:parent-style-name="Master1-Layout2-obj-Título-e-Conteúd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7" style:display-name="Master1-Layout2-obj-Título-e-Conteúdo~LT~Gliederung 7" style:family="paragraph" style:parent-style-name="Master1-Layout2-obj-Título-e-Conteúd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8" style:display-name="Master1-Layout2-obj-Título-e-Conteúdo~LT~Gliederung 8" style:family="paragraph" style:parent-style-name="Master1-Layout2-obj-Título-e-Conteúd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9" style:display-name="Master1-Layout2-obj-Título-e-Conteúdo~LT~Gliederung 9" style:family="paragraph" style:parent-style-name="Master1-Layout2-obj-Título-e-Conteúd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Titel" style:display-name="Master1-Layout2-obj-Título-e-Conteúd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Untertitel" style:display-name="Master1-Layout2-obj-Título-e-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Notizen" style:display-name="Master1-Layout2-obj-Título-e-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Hintergrundobjekte" style:display-name="Master1-Layout2-obj-Título-e-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e-Conteúdo_7e_LT_7e_Hintergrund" style:display-name="Master1-Layout2-obj-Título-e-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0:59:37.708020763</meta:creation-date>
    <meta:generator>LibreOffice/24.2.7.2$Linux_X86_64 LibreOffice_project/420$Build-2</meta:generator>
    <dc:date>2026-06-09T19:41:14.956169274</dc:date>
    <meta:editing-duration>PT29M23S</meta:editing-duration>
    <meta:editing-cycles>10</meta:editing-cycles>
    <meta:print-date>2026-06-09T19:41:09.576926256</meta:print-date>
    <meta:printed-by>PDF files</meta:printed-by>
    <meta:document-statistic meta:table-count="0" meta:image-count="3" meta:object-count="0" meta:page-count="3" meta:paragraph-count="8" meta:word-count="25" meta:character-count="194" meta:non-whitespace-character-count="176"/>
  </office:meta>
</office:document-meta>
</file>